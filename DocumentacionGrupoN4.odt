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1C000000B5424AB97C.png" manifest:media-type="image/png"/>
  <manifest:file-entry manifest:full-path="Pictures/10000001000005D0000002CC2AE5CFB7.png" manifest:media-type="image/png"/>
  <manifest:file-entry manifest:full-path="Pictures/10000001000000A20000003CDB129406.png" manifest:media-type="image/png"/>
  <manifest:file-entry manifest:full-path="Pictures/100000010000009A000000389BE99456.png" manifest:media-type="image/png"/>
  <manifest:file-entry manifest:full-path="Pictures/100000010000012C00000257837AD1DC.png" manifest:media-type="image/png"/>
  <manifest:file-entry manifest:full-path="Pictures/10000001000001A60000004364D13B80.png" manifest:media-type="image/png"/>
  <manifest:file-entry manifest:full-path="Pictures/10000001000001310000002D531FB0D5.png" manifest:media-type="image/png"/>
  <manifest:file-entry manifest:full-path="Pictures/10000001000000C40000006CF83C40FA.png" manifest:media-type="image/png"/>
  <manifest:file-entry manifest:full-path="Pictures/100000010000019B0000005CF566D651.png" manifest:media-type="image/png"/>
  <manifest:file-entry manifest:full-path="Pictures/100000010000020F00000052D0D877A5.png" manifest:media-type="image/png"/>
  <manifest:file-entry manifest:full-path="Pictures/100000010000029C00000083402F43C4.png" manifest:media-type="image/png"/>
  <manifest:file-entry manifest:full-path="Pictures/1000000100000332000000663F29A294.png" manifest:media-type="image/png"/>
  <manifest:file-entry manifest:full-path="Pictures/10000001000001050000003488BFF8F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0203" officeooo:paragraph-rsid="00110203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10203" officeooo:paragraph-rsid="00110203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style:text-underline-style="none" fo:font-weight="normal" officeooo:rsid="00110203" officeooo:paragraph-rsid="00110203" style:font-style-asian="normal" style:font-weight-asian="normal" style:font-style-complex="normal" style:font-weight-complex="normal"/>
    </style:style>
    <style:style style:name="P4" style:family="paragraph" style:parent-style-name="Heading_20_2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font-style="normal" style:text-underline-style="none" fo:font-weight="normal" officeooo:rsid="00141d2c" officeooo:paragraph-rsid="00141d2c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style:text-underline-style="none" fo:font-weight="normal" officeooo:rsid="00141d2c" officeooo:paragraph-rsid="00141d2c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style:text-underline-style="none" fo:font-weight="normal" officeooo:rsid="00149448" officeooo:paragraph-rsid="0014944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c19ff" officeooo:paragraph-rsid="001c19ff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style:text-underline-style="none" fo:font-weight="normal" officeooo:rsid="001c19ff" officeooo:paragraph-rsid="001c19ff" style:font-style-asian="normal" style:font-weight-asian="normal" style:font-style-complex="normal" style:font-weight-complex="normal"/>
    </style:style>
    <style:style style:name="P10" style:family="paragraph" style:parent-style-name="Heading_20_1">
      <style:text-properties style:text-underline-style="solid" style:text-underline-width="auto" style:text-underline-color="font-color"/>
    </style:style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P12" style:family="paragraph" style:parent-style-name="Text_20_body">
      <style:text-properties style:text-underline-style="none" officeooo:rsid="00149448" officeooo:paragraph-rsid="00149448"/>
    </style:style>
    <style:style style:name="P13" style:family="paragraph" style:parent-style-name="Text_20_body">
      <style:text-properties style:text-underline-style="none" officeooo:rsid="0015d53f" officeooo:paragraph-rsid="0015d53f"/>
    </style:style>
    <style:style style:name="P14" style:family="paragraph" style:parent-style-name="Text_20_body">
      <style:text-properties style:text-underline-style="none" officeooo:rsid="0015e239" officeooo:paragraph-rsid="0015e239"/>
    </style:style>
    <style:style style:name="P15" style:family="paragraph" style:parent-style-name="Text_20_body" style:list-style-name="L2">
      <style:text-properties style:text-underline-style="none" officeooo:rsid="0015e239" officeooo:paragraph-rsid="0015e239"/>
    </style:style>
    <style:style style:name="P16" style:family="paragraph" style:parent-style-name="Heading_20_1">
      <style:text-properties style:text-underline-style="solid" style:text-underline-width="auto" style:text-underline-color="font-color" officeooo:rsid="0015e239" officeooo:paragraph-rsid="0015e239"/>
    </style:style>
    <style:style style:name="P17" style:family="paragraph" style:parent-style-name="Text_20_body">
      <style:text-properties style:text-underline-style="solid" style:text-underline-width="auto" style:text-underline-color="font-color" officeooo:rsid="0015e239" officeooo:paragraph-rsid="0015e239"/>
    </style:style>
    <style:style style:name="P18" style:family="paragraph" style:parent-style-name="Heading_20_3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officeooo:rsid="00172d0c" officeooo:paragraph-rsid="00172d0c"/>
    </style:style>
    <style:style style:name="P20" style:family="paragraph" style:parent-style-name="Standard">
      <style:text-properties fo:font-style="normal" style:text-underline-style="none" fo:font-weight="normal" officeooo:rsid="00172d0c" officeooo:paragraph-rsid="00172d0c" style:font-style-asian="normal" style:font-weight-asian="normal" style:font-style-complex="normal" style:font-weight-complex="normal"/>
    </style:style>
    <style:style style:name="P21" style:family="paragraph" style:parent-style-name="Heading_20_3">
      <style:text-properties style:text-underline-style="solid" style:text-underline-width="auto" style:text-underline-color="font-color" officeooo:rsid="00172d0c" officeooo:paragraph-rsid="00172d0c"/>
    </style:style>
    <style:style style:name="P22" style:family="paragraph" style:parent-style-name="Text_20_body">
      <style:text-properties style:text-underline-style="none" officeooo:rsid="00172d0c" officeooo:paragraph-rsid="00172d0c"/>
    </style:style>
    <style:style style:name="P23" style:family="paragraph" style:parent-style-name="Text_20_body">
      <style:text-properties style:text-underline-style="solid" style:text-underline-width="auto" style:text-underline-color="font-color" officeooo:rsid="00172d0c" officeooo:paragraph-rsid="00172d0c"/>
    </style:style>
    <style:style style:name="P24" style:family="paragraph" style:parent-style-name="Text_20_body">
      <style:text-properties style:text-underline-style="none" officeooo:rsid="00172d0c" officeooo:paragraph-rsid="0017cb8e"/>
    </style:style>
    <style:style style:name="P25" style:family="paragraph" style:parent-style-name="Text_20_body">
      <style:text-properties style:text-underline-style="none" officeooo:rsid="0017cb8e" officeooo:paragraph-rsid="0017cb8e"/>
    </style:style>
    <style:style style:name="P26" style:family="paragraph" style:parent-style-name="Heading_20_3">
      <style:text-properties style:text-underline-style="solid" style:text-underline-width="auto" style:text-underline-color="font-color" officeooo:rsid="00172d0c" officeooo:paragraph-rsid="001c19ff"/>
    </style:style>
    <style:style style:name="P27" style:family="paragraph" style:parent-style-name="Text_20_body">
      <style:text-properties style:text-underline-style="none" officeooo:rsid="0017cb8e" officeooo:paragraph-rsid="001c19ff"/>
    </style:style>
    <style:style style:name="P28" style:family="paragraph" style:parent-style-name="Text_20_body">
      <style:text-properties fo:font-style="italic" style:text-underline-style="none" officeooo:rsid="001c19ff" officeooo:paragraph-rsid="001c19ff" style:font-style-asian="italic" style:font-style-complex="italic"/>
    </style:style>
    <style:style style:name="P29" style:family="paragraph" style:parent-style-name="Text_20_body">
      <style:text-properties style:text-underline-style="none" officeooo:rsid="001c19ff" officeooo:paragraph-rsid="001c19ff"/>
    </style:style>
    <style:style style:name="P30" style:family="paragraph" style:parent-style-name="Text_20_body">
      <style:text-properties style:text-underline-style="none" officeooo:rsid="001dfa5f" officeooo:paragraph-rsid="001dfa5f"/>
    </style:style>
    <style:style style:name="P31" style:family="paragraph" style:parent-style-name="Text_20_body">
      <style:text-properties style:text-underline-style="solid" style:text-underline-width="auto" style:text-underline-color="font-color" officeooo:rsid="0017cb8e" officeooo:paragraph-rsid="001c19ff"/>
    </style:style>
    <style:style style:name="P32" style:family="paragraph" style:parent-style-name="Heading_20_3">
      <style:text-properties style:text-underline-style="solid" style:text-underline-width="auto" style:text-underline-color="font-color" officeooo:rsid="00172d0c" officeooo:paragraph-rsid="0017cb8e"/>
    </style:style>
    <style:style style:name="P33" style:family="paragraph" style:parent-style-name="Text_20_body">
      <style:text-properties style:text-underline-style="solid" style:text-underline-width="auto" style:text-underline-color="font-color" officeooo:rsid="0017cb8e" officeooo:paragraph-rsid="0017cb8e"/>
    </style:style>
    <style:style style:name="T1" style:family="text">
      <style:text-properties officeooo:rsid="001a427b"/>
    </style:style>
    <style:style style:name="T2" style:family="text">
      <style:text-properties officeooo:rsid="00125705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officeooo:rsid="00149448"/>
    </style:style>
    <style:style style:name="T7" style:family="text">
      <style:text-properties officeooo:rsid="0015d53f"/>
    </style:style>
    <style:style style:name="T8" style:family="text">
      <style:text-properties officeooo:rsid="00150f67"/>
    </style:style>
    <style:style style:name="T9" style:family="text">
      <style:text-properties officeooo:rsid="0017cb8e"/>
    </style:style>
    <style:style style:name="T10" style:family="text">
      <style:text-properties officeooo:rsid="001c19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✸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✸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✸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✸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bajo Practico Integrador Baraja de cartas españolas</text:p>
      <text:p text:style-name="P1"/>
      <text:p text:style-name="P2">Integrantes:</text:p>
      <text:p text:style-name="P1">Julieta Herrera</text:p>
      <text:p text:style-name="P1">Tatiana Peralta</text:p>
      <text:p text:style-name="P1">María de los Ángeles Zalazar <text:span text:style-name="T1">(líder)</text:span></text:p>
      <text:p text:style-name="P1"/>
      <text:p text:style-name="P2">Comisi<text:span text:style-name="T2">ó</text:span>n:<text:span text:style-name="T3"> </text:span><text:span text:style-name="T4">1 porg. 1</text:span></text:p>
      <text:p text:style-name="P2">Materia:<text:span text:style-name="T5"> </text:span><text:span text:style-name="T4">Programación II</text:span></text:p>
      <text:p text:style-name="P3"/>
      <text:h text:style-name="P4" text:outline-level="2">An<text:span text:style-name="T2">á</text:span>lisis del Problema</text:h>
      <text:p text:style-name="P5">Necesitamos crear un programa que nos permita simular un comienzo de partida para un juego (aun sin definir) que utilice cartas de baraja española.</text:p>
      <text:p text:style-name="P5">El sistema nos debe permitir…</text:p>
      <text:p text:style-name="P5"/>
      <text:list text:style-name="L1">
        <text:list-item>
          <text:p text:style-name="P6">Crear una baraja con 40 cartas con los palos bastos, oros, espadas y copas con los números del 1 al 12 omitiendo 8 y 9. </text:p>
        </text:list-item>
        <text:list-item>
          <text:p text:style-name="P6">Mezclar las cartas y que el mazo quede en un orden aleatorio.</text:p>
        </text:list-item>
        <text:list-item>
          <text:p text:style-name="P6">Sacar la siguiente carta de <text:span text:style-name="T6">la baraja</text:span>.</text:p>
        </text:list-item>
        <text:list-item>
          <text:p text:style-name="P6">Consultar cuantas cartas quedan disponibles en <text:span text:style-name="T6">la baraja</text:span>.</text:p>
        </text:list-item>
        <text:list-item>
          <text:p text:style-name="P6">Repartir x cantidad de cartas.</text:p>
        </text:list-item>
        <text:list-item>
          <text:p text:style-name="P6">Mostrar las cartas repartidas.</text:p>
        </text:list-item>
        <text:list-item>
          <text:p text:style-name="P7">Mostrar las cartas restantes en la baraja.</text:p>
          <text:p text:style-name="P7"/>
        </text:list-item>
      </text:list>
      <text:p text:style-name="P5">Para lograr <text:span text:style-name="T6">esto vamos a necesitar de un arreglo dinámico para lograr la aleatoriedad en el orden de las cartas que necesitamos para simular una partida física y métodos mas estructurados para realizar las acciones requeridas.</text:span></text:p>
      <text:p text:style-name="P5"/>
      <text:p text:style-name="P8">Con esta problemática resuelta debemos crear un juego que utilice el mazo de cartas españolas como base para una partida, en nuestro caso Mayor y Menor</text:p>
      <text:p text:style-name="P8">Ahora nos deberia permitir</text:p>
      <text:p text:style-name="P8"/>
      <text:list text:continue-numbering="true" text:style-name="L1">
        <text:list-item>
          <text:p text:style-name="P9">Mezclar la baraja la iniciar</text:p>
        </text:list-item>
        <text:list-item>
          <text:p text:style-name="P9">Sacar la primer carta de la baraja </text:p>
        </text:list-item>
        <text:list-item>
          <text:p text:style-name="P9">Seleccionar una prediccion</text:p>
        </text:list-item>
        <text:list-item>
          <text:p text:style-name="P9">Acomular puntos</text:p>
        </text:list-item>
        <text:list-item>
          <text:p text:style-name="P9">Jugar cierta cantidad de rondas</text:p>
        </text:list-item>
        <text:list-item>
          <text:p text:style-name="P9">Y mostrar si el jugador perdio o gano</text:p>
        </text:list-item>
      </text:list>
      <text:h text:style-name="P4" text:outline-level="2">Diagrama UML del proyecto</text:h>
      <text:p text:style-name="P3"/>
      <text:p text:style-name="P3"/>
      <text:p text:style-name="P3"/>
      <text:p text:style-name="P3"><draw:frame draw:style-name="fr1" draw:name="Imagen13" text:anchor-type="char" svg:width="17cm" svg:height="8.179cm" draw:z-index="12"><draw:image xlink:href="Pictures/10000001000005D0000002CC2AE5CFB7.png" xlink:type="simple" xlink:show="embed" xlink:actuate="onLoad" draw:mime-type="image/png"/></draw:frame><text:soft-page-break/></text:p>
      <text:h text:style-name="P10" text:outline-level="1">Análisis y justificación de diseño</text:h>
      <text:p text:style-name="P11"/>
      <text:p text:style-name="P12">Como se planteo desde el análisis inicial, <text:span text:style-name="T7">necesitamos</text:span> <text:span text:style-name="T7">u</text:span>n arreglo dinámico para la clase Baraja, para <text:span text:style-name="T7">que po</text:span><text:span text:style-name="T8">damos invocarla desde los distintos métodos </text:span><text:span text:style-name="T7">y modificar su orden y su tamaño cuando sea necesario.</text:span></text:p>
      <text:p text:style-name="P13">Usamos encapsulamiento en los atributos para evitar inconsistencias y tener controlados los accesos a lo largo del programa ya que vamos a estar necesitando mucho de la modificación de datos.</text:p>
      <text:p text:style-name="P14">Utilizamos dos patrones de diseño en ciertas clases de nuestro programa...</text:p>
      <text:list text:style-name="L2">
        <text:list-item>
          <text:p text:style-name="P15">Controlador: para la clase menú lo que nos permitió tener una visión mas limpia de la interacción usuario-programa.</text:p>
        </text:list-item>
        <text:list-item>
          <text:p text:style-name="P15">Experto: para la clase baraja lo que nos permite implementar los métodos desde la misma clase dueña de los datos.</text:p>
        </text:list-item>
      </text:list>
      <text:p text:style-name="P11"/>
      <text:h text:style-name="P16" text:outline-level="1">Capturas de ejecución</text:h>
      <text:p text:style-name="P17"/>
      <text:h text:style-name="P18" text:outline-level="3">Menú</text:h>
      <text:p text:style-name="P19">Este mismo se ejecuta automáticamente al iniciar el programa y al terminar alguna de las acciones enlistadas salvo la opción “7)Salir”.</text:p>
      <text:p text:style-name="Text_20_body"><draw:frame draw:style-name="fr2" draw:name="Imagen1" text:anchor-type="char" svg:width="7.514cm" svg:height="4.789cm" draw:z-index="0"><draw:image xlink:href="Pictures/100000010000011C000000B5424AB97C.png" xlink:type="simple" xlink:show="embed" xlink:actuate="onLoad" draw:mime-type="image/png"/></draw:frame></text:p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1" text:outline-level="3">Barajar (opción 1)</text:h>
      <text:p text:style-name="P22">La primera opción del menú, luego de ingresar 1 por teclado muestra el mensaje “barajando…” , internamente mezcla las cartas en el ArrayList.</text:p>
      <text:p text:style-name="P23"><draw:frame draw:style-name="fr3" draw:name="Imagen2" text:anchor-type="char" svg:x="6.357cm" svg:y="0.131cm" svg:width="4.286cm" svg:height="1.588cm" draw:z-index="1"><draw:image xlink:href="Pictures/10000001000000A20000003CDB129406.png" xlink:type="simple" xlink:show="embed" xlink:actuate="onLoad" draw:mime-type="image/png"/></draw:frame></text:p>
      <text:p text:style-name="P23"/>
      <text:p text:style-name="P23"/>
      <text:h text:style-name="P21" text:outline-level="3">Sacar una carta (opción 2)</text:h>
      <text:p text:style-name="P22">Luego de ingresar 2 por teclado muestra un mensaje con la carta seleccionada, en este caso 7 de basto , internamente toma la primer carta del ArrayList.</text:p>
      <text:p text:style-name="P23"><draw:frame draw:style-name="fr4" draw:name="Imagen3" text:anchor-type="char" svg:width="4.075cm" svg:height="1.482cm" draw:z-index="2"><draw:image xlink:href="Pictures/100000010000009A000000389BE99456.png" xlink:type="simple" xlink:show="embed" xlink:actuate="onLoad" draw:mime-type="image/png"/></draw:frame></text:p>
      <text:h text:style-name="P21" text:outline-level="3"/>
      <text:h text:style-name="P21" text:outline-level="3"/>
      <text:h text:style-name="P21" text:outline-level="3">Ver cantidad de cartas (opción 3)</text:h>
      <text:p text:style-name="P22">Al ingresar 3 se muestra el mensaje “Cartas disponibles: “ junto a la cantidad de cartas restantes en la baraja, en este caso 39 porque anteriormente sacamos una.</text:p>
      <text:p text:style-name="P23"><draw:frame draw:style-name="fr4" draw:name="Imagen4" text:anchor-type="char" svg:width="8.07cm" svg:height="1.191cm" draw:z-index="3"><draw:image xlink:href="Pictures/10000001000001310000002D531FB0D5.png" xlink:type="simple" xlink:show="embed" xlink:actuate="onLoad" draw:mime-type="image/png"/></draw:frame></text:p>
      <text:h text:style-name="P21" text:outline-level="3"/>
      <text:h text:style-name="P21" text:outline-level="3">Repartir (opción 4)</text:h>
      <text:p text:style-name="P24">Al ingresar <text:span text:style-name="T9">4</text:span> se muestra el mensaje “<text:span text:style-name="T9">¿Cuantas cartas quiere repartir”</text:span> <text:span text:style-name="T9">y pasa a solicitar por teclado la cantidad de cartas que se quieren tomar de</text:span> la baraja, <text:span text:style-name="T9">internamente toma esa cantidad de cartas del arreglo y genera uno nuevo que contiene las cartas repartidas.</text:span></text:p>
      <text:p text:style-name="P23"><draw:frame draw:style-name="fr4" draw:name="Imagen5" text:anchor-type="char" svg:width="10.874cm" svg:height="2.434cm" draw:z-index="4"><draw:image xlink:href="Pictures/100000010000019B0000005CF566D651.png" xlink:type="simple" xlink:show="embed" xlink:actuate="onLoad" draw:mime-type="image/png"/></draw:frame></text:p>
      <text:p text:style-name="P23"/>
      <text:h text:style-name="P21" text:outline-level="3" text:is-list-header="true"><text:soft-page-break/></text:h>
      <text:h text:style-name="P21" text:outline-level="3"/>
      <text:h text:style-name="P21" text:outline-level="3">Ver cartas repartidas (opción 5)</text:h>
      <text:p text:style-name="P25">Al seleccionar 5 muestra el arreglo generado al seleccionar la opcion 4 ,es decir, las cartas tomadas.</text:p>
      <text:p text:style-name="P25"><draw:frame draw:style-name="fr4" draw:name="Imagen6" text:anchor-type="char" svg:width="5.186cm" svg:height="2.858cm" draw:z-index="5"><draw:image xlink:href="Pictures/10000001000000C40000006CF83C40FA.png" xlink:type="simple" xlink:show="embed" xlink:actuate="onLoad" draw:mime-type="image/png"/></draw:frame></text:p>
      <text:h text:style-name="P21" text:outline-level="3"/>
      <text:h text:style-name="P21" text:outline-level="3"/>
      <text:h text:style-name="P21" text:outline-level="3"/>
      <text:h text:style-name="P21" text:outline-level="3">Ver cartas restantes (opción 6)</text:h>
      <text:p text:style-name="P25">Al seleccionar 6 nos muestra todas las cartas restantes en la baraja (todas las cartas que no han sido tomadas o repartidas)</text:p>
      <text:p text:style-name="P23"><draw:frame draw:style-name="fr3" draw:name="Imagen7" text:anchor-type="char" svg:x="2.764cm" svg:y="-0.291cm" svg:width="4.129cm" svg:height="7.234cm" draw:z-index="6"><draw:image xlink:href="Pictures/100000010000012C00000257837AD1DC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h text:style-name="P26" text:outline-level="3"><text:span text:style-name="T10">Jugar</text:span><text:span text:style-name="T9"> </text:span>(opción <text:span text:style-name="T10">7</text:span>)</text:h>
      <text:p text:style-name="P27"><text:span text:style-name="T10">Al </text:span>seleccionar <text:span text:style-name="T10">7 se abrira un nuevo menu con las opciones..</text:span></text:p>
      <text:p text:style-name="P28"><draw:frame draw:style-name="fr3" draw:name="Imagen9" text:anchor-type="char" svg:x="0.542cm" svg:y="0.249cm" svg:width="11.155cm" svg:height="1.736cm" draw:z-index="8"><draw:image xlink:href="Pictures/100000010000020F00000052D0D877A5.png" xlink:type="simple" xlink:show="embed" xlink:actuate="onLoad" draw:mime-type="image/png"/></draw:frame></text:p>
      <text:p text:style-name="P28"/>
      <text:p text:style-name="P28"/>
      <text:p text:style-name="P28">Jugar (opción 1)</text:p>
      <text:p text:style-name="P29">El programa ejecutara el metodo partida() en la case baraja ,el cual ejecuta la funcion de barajar automaticamente, ir sacando cartas, solicitar una prediccion al usuario ,comparar el resultado a la desicion tomada y muestra si el jugador gano o perdio.</text:p>
      <text:p text:style-name="P30">Se repite la solicitud de predicción 4 veces ya que son 4 rondas por partida.</text:p>
      <text:p text:style-name="P29"><draw:frame draw:style-name="fr3" draw:name="Imagen10" text:anchor-type="char" svg:x="1.092cm" svg:y="0.385cm" svg:width="14.139cm" svg:height="2.773cm" draw:z-index="9"><draw:image xlink:href="Pictures/100000010000029C00000083402F43C4.png" xlink:type="simple" xlink:show="embed" xlink:actuate="onLoad" draw:mime-type="image/png"/></draw:frame><text:soft-page-break/></text:p>
      <text:p text:style-name="P29"><draw:frame draw:style-name="fr4" draw:name="Imagen11" text:anchor-type="char" svg:width="8.932cm" svg:height="1.418cm" draw:z-index="10"><draw:image xlink:href="Pictures/10000001000001A60000004364D13B80.png" xlink:type="simple" xlink:show="embed" xlink:actuate="onLoad" draw:mime-type="image/png"/></draw:frame></text:p>
      <text:p text:style-name="P29"/>
      <text:p text:style-name="P29"/>
      <text:p text:style-name="P28">Reglas (opción 2)</text:p>
      <text:p text:style-name="P29">El programa imprimira una breve descripcion de las reglas.</text:p>
      <text:p text:style-name="P29"><draw:frame draw:style-name="fr5" draw:name="Imagen12" text:anchor-type="char" svg:width="17cm" svg:height="2.118cm" draw:z-index="11"><draw:image xlink:href="Pictures/1000000100000332000000663F29A294.png" xlink:type="simple" xlink:show="embed" xlink:actuate="onLoad" draw:mime-type="image/png"/></draw:frame></text:p>
      <text:p text:style-name="P28">Salir (opción 3)</text:p>
      <text:p text:style-name="P29">El programa te vuelve al menu principal</text:p>
      <text:p text:style-name="P27"/>
      <text:p text:style-name="P31"/>
      <text:h text:style-name="P32" text:outline-level="3"><text:span text:style-name="T9">Salir </text:span>(opción <text:span text:style-name="T10">8</text:span>)</text:h>
      <text:p text:style-name="P25">Al seleccionar <text:span text:style-name="T10">8</text:span> muestra el mensaje “¡¡Gracias por jugar!!” y termina la ejecución del programa</text:p>
      <text:p text:style-name="P25"><draw:frame draw:style-name="fr4" draw:name="Imagen8" text:anchor-type="char" svg:width="6.906cm" svg:height="1.376cm" draw:z-index="7"><draw:image xlink:href="Pictures/10000001000001050000003488BFF8FF.png" xlink:type="simple" xlink:show="embed" xlink:actuate="onLoad" draw:mime-type="image/png"/></draw:frame></text:p>
      <text:p text:style-name="P3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7T20:27:32.611674600</meta:creation-date>
    <dc:date>2026-06-22T08:48:27.767593200</dc:date>
    <meta:editing-duration>PT11M58S</meta:editing-duration>
    <meta:editing-cycles>3</meta:editing-cycles>
    <meta:generator>LibreOffice/26.2.3.2$Windows_X86_64 LibreOffice_project/70e089b17412e4cb7773e41413306b17a2328c34</meta:generator>
    <meta:document-statistic meta:table-count="0" meta:image-count="13" meta:object-count="0" meta:page-count="5" meta:paragraph-count="60" meta:word-count="685" meta:character-count="4026" meta:non-whitespace-character-count="3414"/>
  </office:meta>
</office:document-meta>
</file>